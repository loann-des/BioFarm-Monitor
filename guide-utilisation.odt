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35d18" officeooo:paragraph-rsid="00035d18"/>
    </style:style>
    <style:style style:name="P2" style:family="paragraph" style:parent-style-name="Heading_20_2">
      <style:text-properties officeooo:rsid="00035d18" officeooo:paragraph-rsid="00035d18" fo:background-color="transparent"/>
    </style:style>
    <style:style style:name="P3" style:family="paragraph" style:parent-style-name="Standard">
      <style:text-properties officeooo:rsid="0002f21b" officeooo:paragraph-rsid="0002f21b"/>
    </style:style>
    <style:style style:name="P4" style:family="paragraph" style:parent-style-name="Standard">
      <style:text-properties officeooo:rsid="00035d18" officeooo:paragraph-rsid="00035d18"/>
    </style:style>
    <style:style style:name="P5" style:family="paragraph" style:parent-style-name="Text_20_body">
      <style:text-properties officeooo:rsid="00035d18" officeooo:paragraph-rsid="00035d18"/>
    </style:style>
    <style:style style:name="P6" style:family="paragraph" style:parent-style-name="Text_20_body">
      <style:text-properties officeooo:rsid="00035d18" officeooo:paragraph-rsid="00035d18" fo:background-color="#ffff00"/>
    </style:style>
    <style:style style:name="P7" style:family="paragraph" style:parent-style-name="Text_20_body">
      <style:text-properties officeooo:rsid="00035d18" officeooo:paragraph-rsid="00035d18" fo:background-color="transparent"/>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uide utilisation BIO-Farm Monitor</text:p>
      <text:p text:style-name="P3"/>
      <text:p text:style-name="P3">Création de comptes : </text:p>
      <text:p text:style-name="P3">- nous contacter par e-mail pour la création de votre comptes en nous communicant votre adresse e-mail professionnel qui servira s’identifient de connexion, ainsi que votre numéro de téléphone qui lui nous servira uniquement pour la vérification de votre identité en cas d’oublie de votre mot de passe( votre numéro ainsi que votre e-mail ne seront pas stocké sur nos serveur en ligne afin de limiter toute opération de vole de ceux-ci )</text:p>
      <text:p text:style-name="P3">-nous vous recontacterons suite à la création de votre compte pour vous communique votre mot de passe</text:p>
      <text:p text:style-name="P3"/>
      <text:p text:style-name="P4">Mise en place :</text:p>
      <text:p text:style-name="P4">RDV sur la page Paramètres : <text:s/><text:span text:style-name="T1">XXX</text:span>/settings</text:p>
      <text:p text:style-name="P4">vous pouver y importer les information concernant vos vache et veaux </text:p>
      <text:h text:style-name="P1" text:outline-level="2">Initialisation des vaches :</text:h>
      <text:p text:style-name="P5"><text:tab/>-Fichier pris en charge .xls .odt .csv</text:p>
      <text:p text:style-name="P5"><text:tab/>- format du document :</text:p>
      <text:p text:style-name="P6">XXX TABLEAU</text:p>
      <text:h text:style-name="P1" text:outline-level="2">Initialisation des veaux :</text:h>
      <text:p text:style-name="P5"><text:tab/>-Fichier pris en charge .xls .odt .csv</text:p>
      <text:p text:style-name="P5"><text:tab/>- format du document :</text:p>
      <text:p text:style-name="P6">XXX TABLEAU</text:p>
      <text:h text:style-name="P2" text:outline-level="2">Initialisation Pharmacie</text:h>
      <text:p text:style-name="P5"><text:tab/>-Fichier pris en charge .xls .odt .csv</text:p>
      <text:p text:style-name="P5"><text:tab/>- format du document :</text:p>
      <text:p text:style-name="P6">XXX TABLEAU</text:p>
      <text:h text:style-name="P2" text:outline-level="2">Tarissement | Préparation au vêlage</text:h>
      <text:p text:style-name="P7">Ces paramètre seront utile pour calculer les date de tarissement et de mise en préparation au vêlage.</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5T12:31:37.542437765</meta:creation-date>
    <dc:date>2026-05-25T12:57:34.786106193</dc:date>
    <meta:editing-duration>PT15M36S</meta:editing-duration>
    <meta:editing-cycles>1</meta:editing-cycles>
    <meta:document-statistic meta:table-count="0" meta:image-count="0" meta:object-count="0" meta:page-count="1" meta:paragraph-count="21" meta:word-count="194" meta:character-count="1152" meta:non-whitespace-character-count="970"/>
    <meta:generator>LibreOffice/24.2.7.2$Linux_X86_64 LibreOffice_project/420$Build-2</meta:generator>
  </office:meta>
</office:document-meta>
</file>